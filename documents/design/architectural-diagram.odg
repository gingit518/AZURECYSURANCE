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498cm" fo:min-width="5.008cm"/>
    </style:style>
    <style:style style:name="gr2" style:family="graphic" style:parent-style-name="standard">
      <style:graphic-properties draw:textarea-horizontal-align="justify" draw:textarea-vertical-align="middle" draw:auto-grow-height="false" fo:min-height="2.498cm" fo:min-width="4.962cm"/>
    </style:style>
    <style:style style:name="gr3" style:family="graphic" style:parent-style-name="standard">
      <style:graphic-properties draw:textarea-horizontal-align="justify" draw:textarea-vertical-align="middle" draw:auto-grow-height="false" fo:min-height="0.89cm" fo:min-width="4.072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19cm" fo:min-width="3.3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433cm" fo:min-width="8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162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57cm" fo:min-width="2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9cm" fo:min-width="2.32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8cm" fo:min-width="2.08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62cm" fo:min-width="1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71cm" fo:min-width="1.47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2cm" fo:min-width="2.08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cm" fo:min-width="1.97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38cm" fo:min-width="2.36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15cm" fo:min-width="1.53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87cm" fo:min-width="1.66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start-width="0.3cm" draw:marker-end="Diamond_20_unfilled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809cm" fo:min-width="2.124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stroke="dash" draw:stroke-dash="_32__20_Dots_20_1_20_Dash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515cm" fo:min-width="2.794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1.365cm" fo:min-width="3.431cm"/>
      <style:paragraph-properties style:writing-mode="lr-tb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809cm" fo:min-width="2.32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79cm" fo:min-width="3.692cm"/>
      <style:paragraph-properties style:writing-mode="lr-tb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893cm" fo:min-width="3.9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79cm" fo:min-width="2.26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37cm" fo:min-width="1.492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5.508cm" svg:height="3.429cm" svg:x="1.381cm" svg:y="14.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2" draw:id="id2" draw:layer="layout" svg:width="5.461cm" svg:height="3.429cm" svg:x="8.582cm" svg:y="14.99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.571cm" svg:height="2.159cm" svg:x="9.091cm" svg:y="15.886cm">
          <text:p text:style-name="P2"><text:span text:style-name="T1">Data Warehouse</text:span></text:p>
          <text:p text:style-name="P2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4.445cm" svg:height="2.159cm" svg:x="1.809cm" svg:y="16.04cm">
          <text:p text:style-name="P2"><text:span text:style-name="T1">Search Engin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2" draw:layer="layout" svg:width="9.143cm" svg:height="3.683cm" svg:x="2.441cm" svg:y="8.6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031cm" svg:height="1.778cm" svg:x="5.743cm" svg:y="7.77cm">
          <text:p text:style-name="P2"><text:span text:style-name="T2">oAut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3" draw:layer="layout" svg:width="2.761cm" svg:height="2.629cm" svg:x="8.112cm" svg:y="1.535cm">
          <text:p text:style-name="P2"><text:span text:style-name="T1">Risk-Q </text:span></text:p>
          <text:p text:style-name="P2"><text:span text:style-name="T1">Application</text:span></text:p>
          <text:p text:style-name="P2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5" draw:layer="layout" svg:width="3.048cm" svg:height="1.143cm" svg:x="8.955cm" svg:y="9.956cm">
          <text:p text:style-name="P2"><text:span text:style-name="T2">Springbo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2.794cm" svg:height="1.22cm" svg:x="1.851cm" svg:y="9.979cm">
          <text:p text:style-name="P2"><text:span text:style-name="T2">In-Memory</text:span></text:p>
          <text:p text:style-name="P2"><text:span text:style-name="T2">Ca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158cm" svg:height="1.524cm" svg:x="3.203cm" svg:y="8.251cm">
          <text:p text:style-name="P2"><text:span text:style-name="T2">2-Factor </text:span></text:p>
          <text:p text:style-name="P2"><text:span text:style-name="T2">A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3" xml:id="id4" draw:id="id4" draw:layer="layout" svg:width="1.978cm" svg:height="1.27cm" svg:x="5.699cm" svg:y="5.98cm">
          <text:p text:style-name="P2"><text:span text:style-name="T1">SS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draw:layer="layout" svg:width="2.794cm" svg:height="1.524cm" svg:x="8.128cm" svg:y="8.151cm">
          <text:p text:style-name="P2"><text:span text:style-name="T2">SMS/TOTP </text:span></text:p>
          <text:p text:style-name="P2"><text:span text:style-name="T2">Verif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xml:id="id9" draw:id="id9" draw:layer="layout" svg:width="2.667cm" svg:height="0.916cm" svg:x="11.657cm" svg:y="14.643cm">
          <text:p text:style-name="P2"><text:span text:style-name="T2">Encrypte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xml:id="id6" draw:id="id6" draw:layer="layout" svg:width="3.096cm" svg:height="1.498cm" svg:x="5.334cm" svg:y="11.302cm">
          <text:p text:style-name="P2"><text:span text:style-name="T2">Role based</text:span></text:p>
          <text:p text:style-name="P2"><text:span text:style-name="T2">security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5" xml:id="id5" draw:id="id5" draw:layer="layout" svg:width="2.194cm" svg:height="1.149cm" svg:x="9.323cm" svg:y="3.549cm">
          <text:p text:style-name="P2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xml:id="id1" draw:id="id1" draw:layer="layout" svg:width="2.159cm" svg:height="2.667cm" svg:x="23.606cm" svg:y="1.254cm">
          <text:p text:style-name="P2"><text:span text:style-name="T1">qLik</text:span></text:p>
          <text:p text:style-name="P2"><text:span text:style-name="T1">Analytics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7" draw:text-style-name="P6" draw:layer="layout" svg:x1="24.686cm" svg:y1="3.921cm" svg:x2="14.043cm" svg:y2="16.712cm" draw:start-shape="id1" draw:start-glue-point="6" draw:end-shape="id2" draw:end-glue-point="7" svg:d="M24686 3921v12791h-10643" svg:viewBox="0 0 10644 12792">
          <text:p/>
        </draw:connector>
        <draw:custom-shape draw:style-name="gr18" draw:text-style-name="P3" draw:layer="layout" svg:width="2.832cm" svg:height="1.143cm" svg:x="5.661cm" svg:y="9.875cm">
          <text:p text:style-name="P2"><text:span text:style-name="T1">API 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6" draw:layer="layout" svg:x1="3.735cm" svg:y1="4.556cm" svg:x2="5.699cm" svg:y2="6.615cm" draw:start-shape="id3" draw:start-glue-point="6" draw:end-shape="id4" draw:end-glue-point="5" svg:d="M3735 4556v2059h1964" svg:viewBox="0 0 1965 2060">
          <text:p/>
        </draw:connector>
        <draw:connector draw:style-name="gr19" draw:text-style-name="P6" draw:layer="layout" svg:x1="10.42cm" svg:y1="4.698cm" svg:x2="7.677cm" svg:y2="6.615cm" draw:start-shape="id5" draw:start-glue-point="6" draw:end-shape="id4" draw:end-glue-point="7" svg:d="M10420 4698v1917h-2743" svg:viewBox="0 0 2744 1918">
          <text:p/>
        </draw:connector>
        <draw:connector draw:style-name="gr19" draw:text-style-name="P6" draw:layer="layout" svg:x1="6.882cm" svg:y1="12.8cm" svg:x2="4.135cm" svg:y2="14.97cm" draw:start-shape="id6" draw:start-glue-point="6" draw:end-shape="id7" svg:d="M6882 12800v1085h-2747v1085" svg:viewBox="0 0 2748 2171">
          <text:p/>
        </draw:connector>
        <draw:line draw:style-name="gr20" draw:text-style-name="P6" draw:layer="layout" svg:x1="6.715cm" svg:y1="7.223cm" svg:x2="6.715cm" svg:y2="7.731cm">
          <text:p/>
        </draw:line>
        <draw:line draw:style-name="gr21" draw:text-style-name="P6" draw:layer="layout" svg:x1="1.127cm" svg:y1="13.408cm" svg:x2="26.4cm" svg:y2="13.446cm">
          <text:p/>
        </draw:line>
        <draw:custom-shape draw:style-name="gr22" draw:text-style-name="P3" xml:id="id8" draw:id="id8" draw:layer="layout" svg:width="3.556cm" svg:height="1.905cm" svg:x="12.892cm" svg:y="9.636cm">
          <text:p text:style-name="P2"><text:span text:style-name="T1">Scheduler</text:span></text:p>
          <text:p text:style-name="P2"><text:span text:style-name="T1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6" draw:layer="layout" svg:x1="6.882cm" svg:y1="12.8cm" svg:x2="11.313cm" svg:y2="14.997cm" draw:start-shape="id6" draw:start-glue-point="6" draw:end-shape="id2" draw:end-glue-point="4" svg:d="M6882 12800v1099h4431v1098" svg:viewBox="0 0 4432 2198">
          <text:p/>
        </draw:connector>
        <draw:line draw:style-name="gr21" draw:text-style-name="P6" draw:layer="layout" svg:x1="1cm" svg:y1="5.326cm" svg:x2="26.4cm" svg:y2="5.318cm">
          <text:p/>
        </draw:line>
        <draw:connector draw:style-name="gr19" draw:text-style-name="P6" draw:layer="layout" draw:line-skew="-0.013cm" svg:x1="14.67cm" svg:y1="11.541cm" svg:x2="12.991cm" svg:y2="14.643cm" draw:start-shape="id8" draw:start-glue-point="6" draw:end-shape="id9" draw:end-glue-point="4" svg:d="M14670 11541v1538h-1679v1564" svg:viewBox="0 0 1680 3103">
          <text:p/>
        </draw:connector>
        <draw:custom-shape draw:style-name="gr23" draw:text-style-name="P4" xml:id="id10" draw:id="id10" draw:layer="layout" svg:width="4.245cm" svg:height="1.743cm" svg:x="17.202cm" svg:y="9.336cm">
          <text:p text:style-name="P2"><text:span text:style-name="T1">Integration </text:span></text:p>
          <text:p text:style-name="P2"><text:span text:style-name="T1">Eng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6" draw:layer="layout" svg:x1="19.325cm" svg:y1="11.079cm" svg:x2="14.324cm" svg:y2="15.101cm" draw:start-shape="id10" draw:start-glue-point="6" draw:end-shape="id9" draw:end-glue-point="7" svg:d="M19325 11079v4022h-5001" svg:viewBox="0 0 5002 4023">
          <text:p/>
        </draw:connector>
        <draw:custom-shape draw:style-name="gr24" draw:text-style-name="P7" xml:id="id12" draw:id="id12" draw:layer="layout" svg:width="3.048cm" svg:height="1.143cm" svg:x="19.034cm" svg:y="8.493cm">
          <text:p text:style-name="P2"><text:span text:style-name="T2">Integration</text:span></text:p>
          <text:p text:style-name="P2"><text:span text:style-name="T2">Modu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3" xml:id="id11" draw:id="id11" draw:layer="layout" svg:width="4.191cm" svg:height="2.032cm" svg:x="18.491cm" svg:y="1.416cm">
          <text:p text:style-name="P2"><text:span text:style-name="T1">Integrator DS </text:span></text:p>
          <text:p text:style-name="P2"><text:span text:style-name="T1">(B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9" draw:text-style-name="P6" draw:layer="layout" svg:x1="20.587cm" svg:y1="3.448cm" svg:x2="20.558cm" svg:y2="8.493cm" draw:start-shape="id11" draw:start-glue-point="6" draw:end-shape="id12" draw:end-glue-point="4" svg:d="M20587 3448v2523h-29v2522" svg:viewBox="0 0 30 5046">
          <text:p/>
        </draw:connector>
        <draw:custom-shape draw:style-name="gr26" draw:text-style-name="P8" draw:layer="layout" svg:width="4.445cm" svg:height="1.143cm" svg:x="11.56cm" svg:y="1.381cm">
          <text:p text:style-name="P2">Clients tier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4.445cm" svg:height="1.143cm" svg:x="12.641cm" svg:y="6.815cm">
          <text:p text:style-name="P2">Middle tier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4.445cm" svg:height="1.143cm" svg:x="15.097cm" svg:y="17.891cm">
          <text:p text:style-name="P2">Data tier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4.445cm" svg:height="1.143cm" svg:x="14.716cm" svg:y="3.794cm">
          <text:p text:style-name="P2">Integrations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27.521cm" svg:y1="3.875cm" svg:x2="14.043cm" svg:y2="16.712cm" draw:start-shape="id13" draw:start-glue-point="6" draw:end-shape="id2" draw:end-glue-point="7" svg:d="M27521 3875v12837h-13478" svg:viewBox="0 0 13479 12838">
          <text:p/>
        </draw:connector>
        <draw:custom-shape draw:style-name="gr27" draw:text-style-name="P3" draw:layer="layout" svg:width="2.761cm" svg:height="2.532cm" svg:x="1.668cm" svg:y="1.543cm">
          <text:p text:style-name="P2"><text:span text:style-name="T1">Risk-Q </text:span></text:p>
          <text:p text:style-name="P2"><text:span text:style-name="T1">Admin</text:span></text:p>
          <text:p text:style-name="P2"><text:span text:style-name="T1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8" draw:text-style-name="P5" xml:id="id3" draw:id="id3" draw:layer="layout" svg:width="2.15cm" svg:height="1.173cm" svg:x="2.66cm" svg:y="3.383cm">
          <text:p text:style-name="P2"><text:span text:style-name="T2">Encryp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xml:id="id13" draw:id="id13" draw:layer="layout" svg:width="2.159cm" svg:height="2.667cm" svg:x="26.441cm" svg:y="1.208cm">
          <text:p text:style-name="P2"><text:span text:style-name="T1">PowerBI</text:span></text:p>
          <text:p text:style-name="P2"><text:span text:style-name="T1">Analytics</text:span></text:p>
          <draw:enhanced-geometry svg:viewBox="0 0 21600 21600" draw:mirror-vertical="false" draw:mirror-horizontal="false" draw:glue-points="10800 0 0 10800 10800 21600 21600 10800" draw:text-areas="0 4300 21600 21600" draw:type="flowchart-card" draw:enhanced-path="M 4300 0 L 21600 0 21600 21600 0 21600 0 4300 43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ott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1T16:12:25.259559791</meta:creation-date>
    <meta:generator>LibreOffice/7.3.7.2$Linux_X86_64 LibreOffice_project/30$Build-2</meta:generator>
    <dc:date>2024-06-20T11:32:39.019464370</dc:date>
    <meta:editing-duration>PT46M51S</meta:editing-duration>
    <meta:editing-cycles>12</meta:editing-cycles>
    <meta:document-statistic meta:object-count="40"/>
  </office:meta>
</office:document-meta>
</file>