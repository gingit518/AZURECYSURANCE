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cd4d1" draw:textarea-horizontal-align="justify" draw:textarea-vertical-align="middle" draw:auto-grow-height="false" fo:min-height="2.498cm" fo:min-width="5.008cm"/>
    </style:style>
    <style:style style:name="gr2" style:family="graphic" style:parent-style-name="standard">
      <style:graphic-properties draw:textarea-horizontal-align="justify" draw:textarea-vertical-align="middle" draw:auto-grow-height="false" fo:min-height="2.498cm" fo:min-width="4.962cm"/>
    </style:style>
    <style:style style:name="gr3" style:family="graphic" style:parent-style-name="standard">
      <style:graphic-properties draw:textarea-horizontal-align="justify" draw:textarea-vertical-align="middle" draw:auto-grow-height="false" fo:min-height="0.89cm" fo:min-width="4.072cm"/>
    </style:style>
    <style:style style:name="gr4" style:family="graphic" style:parent-style-name="standard">
      <style:graphic-properties draw:fill-color="#fcd4d1" draw:textarea-horizontal-align="justify" draw:textarea-vertical-align="middle" draw:auto-grow-height="false" fo:min-height="1.19cm" fo:min-width="3.328cm"/>
    </style:style>
    <style:style style:name="gr5" style:family="graphic" style:parent-style-name="standard">
      <style:graphic-properties draw:textarea-horizontal-align="justify" draw:textarea-vertical-align="middle" draw:auto-grow-height="false" fo:min-height="3.433cm" fo:min-width="8.643cm"/>
    </style:style>
    <style:style style:name="gr6" style:family="graphic" style:parent-style-name="standard">
      <style:graphic-properties draw:textarea-horizontal-align="justify" draw:textarea-vertical-align="middle" draw:auto-grow-height="false" fo:min-height="1.162cm" fo:min-width="1.532cm"/>
    </style:style>
    <style:style style:name="gr7" style:family="graphic" style:parent-style-name="standard">
      <style:graphic-properties draw:fill-color="#fcd4d1" draw:textarea-horizontal-align="justify" draw:textarea-vertical-align="middle" draw:auto-grow-height="false" fo:min-height="1.818cm" fo:min-width="1.578cm"/>
    </style:style>
    <style:style style:name="gr8" style:family="graphic" style:parent-style-name="standard">
      <style:graphic-properties draw:fill-color="#fcd4d1" draw:textarea-horizontal-align="justify" draw:textarea-vertical-align="middle" draw:auto-grow-height="false" fo:min-height="1.801cm" fo:min-width="1.588cm"/>
    </style:style>
    <style:style style:name="gr9" style:family="graphic" style:parent-style-name="standard">
      <style:graphic-properties draw:textarea-horizontal-align="justify" draw:textarea-vertical-align="middle" draw:auto-grow-height="false" fo:min-height="1.779cm" fo:min-width="1.589cm"/>
    </style:style>
    <style:style style:name="gr10" style:family="graphic" style:parent-style-name="standard">
      <style:graphic-properties draw:textarea-horizontal-align="justify" draw:textarea-vertical-align="middle" draw:auto-grow-height="false" fo:min-height="0.809cm" fo:min-width="2.324cm"/>
    </style:style>
    <style:style style:name="gr11" style:family="graphic" style:parent-style-name="standard">
      <style:graphic-properties draw:textarea-horizontal-align="justify" draw:textarea-vertical-align="middle" draw:auto-grow-height="false" fo:min-height="0.88cm" fo:min-width="2.088cm"/>
    </style:style>
    <style:style style:name="gr12" style:family="graphic" style:parent-style-name="standard">
      <style:graphic-properties draw:textarea-horizontal-align="justify" draw:textarea-vertical-align="middle" draw:auto-grow-height="false" fo:min-height="1.162cm" fo:min-width="1.5cm"/>
    </style:style>
    <style:style style:name="gr13" style:family="graphic" style:parent-style-name="standard">
      <style:graphic-properties draw:textarea-horizontal-align="justify" draw:textarea-vertical-align="middle" draw:auto-grow-height="false" fo:min-height="0.771cm" fo:min-width="1.479cm"/>
    </style:style>
    <style:style style:name="gr14" style:family="graphic" style:parent-style-name="standard">
      <style:graphic-properties draw:textarea-horizontal-align="justify" draw:textarea-vertical-align="middle" draw:auto-grow-height="false" fo:min-height="1.162cm" fo:min-width="2.088cm"/>
    </style:style>
    <style:style style:name="gr15" style:family="graphic" style:parent-style-name="standard">
      <style:graphic-properties draw:textarea-horizontal-align="justify" draw:textarea-vertical-align="middle" draw:auto-grow-height="false" fo:min-height="0.6cm" fo:min-width="1.971cm"/>
    </style:style>
    <style:style style:name="gr16" style:family="graphic" style:parent-style-name="standard">
      <style:graphic-properties draw:textarea-horizontal-align="justify" draw:textarea-vertical-align="middle" draw:auto-grow-height="false" fo:min-height="0.653cm" fo:min-width="1.909cm"/>
    </style:style>
    <style:style style:name="gr17" style:family="graphic" style:parent-style-name="standard">
      <style:graphic-properties draw:textarea-horizontal-align="justify" draw:textarea-vertical-align="middle" draw:auto-grow-height="false" fo:min-height="1.138cm" fo:min-width="2.368cm"/>
    </style:style>
    <style:style style:name="gr18" style:family="graphic" style:parent-style-name="standard">
      <style:graphic-properties draw:textarea-horizontal-align="justify" draw:textarea-vertical-align="middle" draw:auto-grow-height="false" fo:min-height="0.837cm" fo:min-width="1.492cm"/>
    </style:style>
    <style:style style:name="gr19" style:family="graphic" style:parent-style-name="standard">
      <style:graphic-properties draw:textarea-horizontal-align="justify" draw:textarea-vertical-align="middle" draw:auto-grow-height="false" fo:min-height="0.815cm" fo:min-width="1.532cm"/>
    </style:style>
    <style:style style:name="gr20" style:family="graphic" style:parent-style-name="standard">
      <style:graphic-properties draw:textarea-horizontal-align="justify" draw:textarea-vertical-align="middle" draw:auto-grow-height="false" fo:min-height="1.887cm" fo:min-width="1.66cm"/>
    </style:style>
    <style:style style:name="gr21" style:family="graphic" style:parent-style-name="objectwithoutfill">
      <style:graphic-properties svg:stroke-color="#000000" draw:marker-start="Arrow" draw:marker-start-width="0.3cm" draw:marker-end="Diamond_20_unfilled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809cm" fo:min-width="2.124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draw:stroke="dash" draw:stroke-dash="_32__20_Dots_20_1_20_Dash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515cm" fo:min-width="2.794cm"/>
    </style:style>
    <style:style style:name="gr27" style:family="graphic" style:parent-style-name="standard">
      <style:graphic-properties draw:fill-color="#fcd4d1" draw:textarea-horizontal-align="justify" draw:textarea-vertical-align="middle" draw:auto-grow-height="false" fo:min-height="2.38cm" fo:min-width="3.431cm"/>
    </style:style>
    <style:style style:name="gr28" style:family="graphic" style:parent-style-name="standard">
      <style:graphic-properties draw:fill-color="#fcd4d1" draw:textarea-horizontal-align="justify" draw:textarea-vertical-align="middle" draw:auto-grow-height="false" fo:min-height="0.809cm" fo:min-width="2.324cm"/>
    </style:style>
    <style:style style:name="gr29" style:family="graphic" style:parent-style-name="standard">
      <style:graphic-properties draw:textarea-horizontal-align="justify" draw:textarea-vertical-align="middle" draw:auto-grow-height="false" fo:min-height="1.379cm" fo:min-width="2.549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893cm" fo:min-width="3.945cm"/>
    </style:style>
    <style:style style:name="gr31" style:family="graphic" style:parent-style-name="standard">
      <style:graphic-properties draw:fill-color="#fcd4d1" draw:textarea-horizontal-align="justify" draw:textarea-vertical-align="middle" draw:auto-grow-height="false" fo:min-height="1.515cm" fo:min-width="2.794cm"/>
    </style:style>
    <style:style style:name="gr32" style:family="graphic" style:parent-style-name="standard">
      <style:graphic-properties draw:fill-color="#fcd4d1" draw:textarea-horizontal-align="justify" draw:textarea-vertical-align="middle" draw:auto-grow-height="false" fo:min-height="2.193cm" fo:min-width="4.961cm"/>
    </style:style>
    <style:style style:name="gr33" style:family="graphic" style:parent-style-name="standard">
      <style:graphic-properties draw:textarea-horizontal-align="justify" draw:textarea-vertical-align="middle" draw:auto-grow-height="false" fo:min-height="2.069cm" fo:min-width="4.999cm"/>
    </style:style>
    <style:style style:name="gr34" style:family="graphic" style:parent-style-name="standard">
      <style:graphic-properties draw:textarea-horizontal-align="justify" draw:textarea-vertical-align="middle" draw:auto-grow-height="false" fo:min-height="2.505cm" fo:min-width="4.453cm"/>
    </style:style>
    <style:style style:name="gr35" style:family="graphic" style:parent-style-name="standard">
      <style:graphic-properties draw:fill-color="#fffbcc" draw:textarea-horizontal-align="justify" draw:textarea-vertical-align="middle" draw:auto-grow-height="false" fo:min-height="0.843cm" fo:min-width="2.368cm"/>
    </style:style>
    <style:style style:name="gr36" style:family="graphic" style:parent-style-name="standard">
      <style:graphic-properties draw:textarea-horizontal-align="justify" draw:textarea-vertical-align="middle" draw:auto-grow-height="false" fo:min-height="0.809cm" fo:min-width="2.363cm"/>
    </style:style>
    <style:style style:name="gr37" style:family="graphic" style:parent-style-name="standard">
      <style:graphic-properties draw:textarea-horizontal-align="justify" draw:textarea-vertical-align="middle" draw:auto-grow-height="false" fo:min-height="2.455cm" fo:min-width="2.794cm"/>
    </style:style>
    <style:style style:name="gr38" style:family="graphic" style:parent-style-name="standard">
      <style:graphic-properties draw:fill-color="#fcd4d1" draw:textarea-horizontal-align="justify" draw:textarea-vertical-align="middle" draw:auto-grow-height="false" fo:min-height="2.102cm" fo:min-width="2.794cm"/>
    </style:style>
    <style:style style:name="gr39" style:family="graphic" style:parent-style-name="standard">
      <style:graphic-properties draw:fill-color="#fffbcc" draw:textarea-horizontal-align="justify" draw:textarea-vertical-align="middle" draw:auto-grow-height="false" fo:min-height="0.843cm" fo:min-width="1.971cm"/>
    </style:style>
    <style:style style:name="P1" style:family="paragraph">
      <loext:graphic-properties draw:fill-color="#fcd4d1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cd4d1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5.508cm" svg:height="3.429cm" svg:x="1.381cm" svg:y="14.97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xml:id="id2" draw:id="id2" draw:layer="layout" svg:width="5.461cm" svg:height="3.429cm" svg:x="8.582cm" svg:y="14.997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4.571cm" svg:height="2.159cm" svg:x="9.091cm" svg:y="15.886cm">
          <text:p text:style-name="P3"><text:span text:style-name="T1">Data Warehouse</text:span></text:p>
          <text:p text:style-name="P3"><text:span text:style-name="T1">Postgre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4.445cm" svg:height="2.159cm" svg:x="1.809cm" svg:y="16.04cm">
          <text:p text:style-name="P3"><text:span text:style-name="T1">Elastic Search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2" draw:layer="layout" svg:width="9.143cm" svg:height="3.683cm" svg:x="2.441cm" svg:y="8.659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031cm" svg:height="1.778cm" svg:x="5.743cm" svg:y="7.77cm">
          <text:p text:style-name="P5"><text:span text:style-name="T2">oAut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1" draw:layer="layout" svg:width="2.077cm" svg:height="2.58cm" svg:x="1.589cm" svg:y="1.605cm">
          <text:p text:style-name="P2"><text:span text:style-name="T1">iOS</text:span></text:p>
          <text:p text:style-name="P2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4" draw:layer="layout" svg:width="2.087cm" svg:height="2.559cm" svg:x="5.252cm" svg:y="1.632cm">
          <text:p text:style-name="P3"><text:span text:style-name="T1">Android</text:span></text:p>
          <text:p text:style-name="P3"><text:span text:style-name="T1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9" draw:text-style-name="P3" xml:id="id3" draw:id="id3" draw:layer="layout" svg:width="2.088cm" svg:height="2.532cm" svg:x="8.785cm" svg:y="1.732cm">
          <text:p text:style-name="P3"><text:span text:style-name="T1">Web</text:span></text:p>
          <text:p text:style-name="P3"><text:span text:style-name="T1">Portal</text:span></text:p>
          <text:p text:style-name="P3"><text:span text:style-name="T1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0" draw:text-style-name="P5" draw:layer="layout" svg:width="3.048cm" svg:height="1.143cm" svg:x="8.955cm" svg:y="9.956cm">
          <text:p text:style-name="P5"><text:span text:style-name="T2">Springboo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5" draw:layer="layout" svg:width="2.794cm" svg:height="1.22cm" svg:x="1.851cm" svg:y="9.979cm">
          <text:p text:style-name="P5"><text:span text:style-name="T2">In-Memory</text:span></text:p>
          <text:p text:style-name="P5"><text:span text:style-name="T2">Cach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5" draw:layer="layout" svg:width="2.158cm" svg:height="1.524cm" svg:x="3.203cm" svg:y="8.251cm">
          <text:p text:style-name="P5"><text:span text:style-name="T2">2-Factor </text:span></text:p>
          <text:p text:style-name="P5"><text:span text:style-name="T2">Au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3" xml:id="id4" draw:id="id4" draw:layer="layout" svg:width="1.978cm" svg:height="1.27cm" svg:x="5.699cm" svg:y="5.98cm">
          <text:p text:style-name="P3"><text:span text:style-name="T1">SS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5" draw:layer="layout" svg:width="2.794cm" svg:height="1.524cm" svg:x="8.128cm" svg:y="8.151cm">
          <text:p text:style-name="P5"><text:span text:style-name="T2">SMS </text:span></text:p>
          <text:p text:style-name="P5"><text:span text:style-name="T2">Verif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5" xml:id="id10" draw:id="id10" draw:layer="layout" svg:width="2.667cm" svg:height="0.916cm" svg:x="11.657cm" svg:y="14.643cm">
          <text:p text:style-name="P5"><text:span text:style-name="T2">Encrypted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5" draw:layer="layout" svg:width="2.601cm" svg:height="0.975cm" svg:x="4.649cm" svg:y="14.557cm">
          <text:p text:style-name="P5"><text:span text:style-name="T2">Encrypt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5" xml:id="id7" draw:id="id7" draw:layer="layout" svg:width="3.096cm" svg:height="1.498cm" svg:x="5.334cm" svg:y="11.302cm">
          <text:p text:style-name="P5"><text:span text:style-name="T2">Role based</text:span></text:p>
          <text:p text:style-name="P5"><text:span text:style-name="T2">security</text:span></text:p>
          <draw:enhanced-geometry svg:viewBox="0 0 21600 21600" draw:mirror-vertical="false" draw:mirror-horizont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5" xml:id="id5" draw:id="id5" draw:layer="layout" svg:width="2.15cm" svg:height="1.173cm" svg:x="1.771cm" svg:y="3.383cm">
          <text:p text:style-name="P5"><text:span text:style-name="T2">Encrypt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5" xml:id="id6" draw:id="id6" draw:layer="layout" svg:width="2.194cm" svg:height="1.149cm" svg:x="5.51cm" svg:y="3.466cm">
          <text:p text:style-name="P5"><text:span text:style-name="T2">Encrypt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3" xml:id="id1" draw:id="id1" draw:layer="layout" svg:width="2.159cm" svg:height="2.667cm" svg:x="22.32cm" svg:y="1.081cm">
          <text:p text:style-name="P3"><text:span text:style-name="T1">qLik</text:span></text:p>
          <text:p text:style-name="P3"><text:span text:style-name="T1">Analytics</text:span></text:p>
          <draw:enhanced-geometry svg:viewBox="0 0 21600 21600" draw:glue-points="10800 0 0 10800 10800 21600 21600 10800" draw:text-areas="0 4300 21600 21600" draw:mirror-vertical="false" draw:mirror-horizontal="false" draw:type="flowchart-card" draw:enhanced-path="M 4300 0 L 21600 0 21600 21600 0 21600 0 4300 4300 0 Z N"/>
        </draw:custom-shape>
        <draw:connector draw:style-name="gr21" draw:text-style-name="P6" draw:layer="layout" draw:line-skew="2.055cm" svg:x1="24.479cm" svg:y1="2.415cm" svg:x2="14.043cm" svg:y2="16.712cm" draw:start-shape="id1" draw:start-glue-point="7" draw:end-shape="id2" draw:end-glue-point="7" svg:d="M24479 2415h2556v14297h-12992" svg:viewBox="0 0 12993 14298">
          <text:p/>
        </draw:connector>
        <draw:custom-shape draw:style-name="gr22" draw:text-style-name="P3" draw:layer="layout" svg:width="2.832cm" svg:height="1.143cm" svg:x="5.661cm" svg:y="9.875cm">
          <text:p text:style-name="P3"><text:span text:style-name="T1">API 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6" draw:layer="layout" svg:x1="9.829cm" svg:y1="4.264cm" svg:x2="7.677cm" svg:y2="6.615cm" draw:start-shape="id3" draw:start-glue-point="6" draw:end-shape="id4" draw:end-glue-point="7" svg:d="M9829 4264v2351h-2152" svg:viewBox="0 0 2153 2352">
          <text:p/>
        </draw:connector>
        <draw:connector draw:style-name="gr23" draw:text-style-name="P6" draw:layer="layout" svg:x1="2.846cm" svg:y1="4.556cm" svg:x2="5.699cm" svg:y2="6.615cm" draw:start-shape="id5" draw:start-glue-point="6" draw:end-shape="id4" draw:end-glue-point="5" svg:d="M2846 4556v2059h2853" svg:viewBox="0 0 2854 2060">
          <text:p/>
        </draw:connector>
        <draw:connector draw:style-name="gr23" draw:text-style-name="P6" draw:layer="layout" svg:x1="6.607cm" svg:y1="4.615cm" svg:x2="6.688cm" svg:y2="5.98cm" draw:start-shape="id6" draw:start-glue-point="6" draw:end-shape="id4" svg:d="M6607 4615v683h81v682" svg:viewBox="0 0 82 1366">
          <text:p/>
        </draw:connector>
        <draw:connector draw:style-name="gr23" draw:text-style-name="P6" draw:layer="layout" svg:x1="6.882cm" svg:y1="12.8cm" svg:x2="4.135cm" svg:y2="14.97cm" draw:start-shape="id7" draw:start-glue-point="6" draw:end-shape="id8" svg:d="M6882 12800v1085h-2747v1085" svg:viewBox="0 0 2748 2171">
          <text:p/>
        </draw:connector>
        <draw:line draw:style-name="gr24" draw:text-style-name="P6" draw:layer="layout" svg:x1="6.715cm" svg:y1="7.223cm" svg:x2="6.715cm" svg:y2="7.731cm">
          <text:p/>
        </draw:line>
        <draw:line draw:style-name="gr25" draw:text-style-name="P6" draw:layer="layout" svg:x1="1.127cm" svg:y1="13.408cm" svg:x2="26.4cm" svg:y2="13.446cm">
          <text:p/>
        </draw:line>
        <draw:custom-shape draw:style-name="gr26" draw:text-style-name="P3" xml:id="id9" draw:id="id9" draw:layer="layout" svg:width="3.556cm" svg:height="1.905cm" svg:x="12.892cm" svg:y="9.636cm">
          <text:p text:style-name="P3"><text:span text:style-name="T1">Scheduler</text:span></text:p>
          <text:p text:style-name="P3"><text:span text:style-name="T1">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6" draw:layer="layout" svg:x1="6.882cm" svg:y1="12.8cm" svg:x2="11.313cm" svg:y2="14.997cm" draw:start-shape="id7" draw:start-glue-point="6" draw:end-shape="id2" draw:end-glue-point="4" svg:d="M6882 12800v1099h4431v1098" svg:viewBox="0 0 4432 2198">
          <text:p/>
        </draw:connector>
        <draw:line draw:style-name="gr25" draw:text-style-name="P6" draw:layer="layout" svg:x1="1cm" svg:y1="5.326cm" svg:x2="26.4cm" svg:y2="5.318cm">
          <text:p/>
        </draw:line>
        <draw:connector draw:style-name="gr23" draw:text-style-name="P6" draw:layer="layout" draw:line-skew="-0.013cm" svg:x1="14.67cm" svg:y1="11.541cm" svg:x2="12.991cm" svg:y2="14.643cm" draw:start-shape="id9" draw:start-glue-point="6" draw:end-shape="id10" draw:end-glue-point="4" svg:d="M14670 11541v1538h-1679v1564" svg:viewBox="0 0 1680 3103">
          <text:p/>
        </draw:connector>
        <draw:custom-shape draw:style-name="gr27" draw:text-style-name="P4" xml:id="id11" draw:id="id11" draw:layer="layout" svg:width="4.245cm" svg:height="2.84cm" svg:x="17.202cm" svg:y="9.036cm">
          <text:p text:style-name="P3"><text:span text:style-name="T1">Customer’s Data</text:span></text:p>
          <text:p text:style-name="P3"><text:span text:style-name="T1">Ingestion </text:span></text:p>
          <text:p text:style-name="P3"><text:span text:style-name="T1">Engin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6" draw:layer="layout" svg:x1="19.325cm" svg:y1="11.876cm" svg:x2="14.324cm" svg:y2="15.101cm" draw:start-shape="id11" draw:start-glue-point="6" draw:end-shape="id10" draw:end-glue-point="7" svg:d="M19325 11876v3225h-5001" svg:viewBox="0 0 5002 3226">
          <text:p/>
        </draw:connector>
        <draw:custom-shape draw:style-name="gr28" draw:text-style-name="P7" xml:id="id13" draw:id="id13" draw:layer="layout" svg:width="3.048cm" svg:height="1.143cm" svg:x="17.764cm" svg:y="8.347cm">
          <text:p text:style-name="P5"><text:span text:style-name="T2">Integration</text:span></text:p>
          <text:p text:style-name="P5"><text:span text:style-name="T2">Modu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" xml:id="id12" draw:id="id12" draw:layer="layout" svg:width="3.048cm" svg:height="2.032cm" svg:x="18.653cm" svg:y="1.508cm">
          <text:p text:style-name="P3"><text:span text:style-name="T1">Integrator</text:span></text:p>
          <text:p text:style-name="P3"><text:span text:style-name="T1">DS</text:span></text:p>
          <draw:enhanced-geometry svg:viewBox="0 0 21600 21600" draw:glue-points="10800 0 0 10800 10800 21600 21600 10800" draw:text-areas="0 4300 21600 21600" draw:mirror-vertical="false" draw:mirror-horizontal="false" draw:type="flowchart-card" draw:enhanced-path="M 4300 0 L 21600 0 21600 21600 0 21600 0 4300 4300 0 Z N"/>
        </draw:custom-shape>
        <draw:connector draw:style-name="gr23" draw:text-style-name="P6" draw:layer="layout" svg:x1="20.177cm" svg:y1="3.54cm" svg:x2="19.288cm" svg:y2="8.347cm" draw:start-shape="id12" draw:start-glue-point="6" draw:end-shape="id13" draw:end-glue-point="4" svg:d="M20177 3540v2404h-889v2403" svg:viewBox="0 0 890 4808">
          <text:p/>
        </draw:connector>
        <draw:custom-shape draw:style-name="gr30" draw:text-style-name="P8" draw:layer="layout" svg:width="4.445cm" svg:height="1.143cm" svg:x="11.56cm" svg:y="1.381cm">
          <text:p text:style-name="P2">Clients tier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445cm" svg:height="1.143cm" svg:x="12.641cm" svg:y="6.815cm">
          <text:p text:style-name="P2">Middle tier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445cm" svg:height="1.143cm" svg:x="15.097cm" svg:y="17.891cm">
          <text:p text:style-name="P2">Data tier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445cm" svg:height="1.143cm" svg:x="20.558cm" svg:y="3.948cm">
          <text:p text:style-name="P2">Integrations</text:p>
          <draw:enhanced-geometry svg:viewBox="0 0 21600 21600" draw:type="rectangle" draw:enhanced-path="M 0 0 L 21600 0 21600 21600 0 21600 0 0 Z N"/>
        </draw:custom-shape>
        <draw:custom-shape draw:style-name="gr31" draw:text-style-name="P4" xml:id="id14" draw:id="id14" draw:layer="layout" svg:width="3.556cm" svg:height="1.905cm" svg:x="22.082cm" svg:y="9.255cm">
          <text:p text:style-name="P3"><text:span text:style-name="T1">AI Analysis</text:span></text:p>
          <text:p text:style-name="P3"><text:span text:style-name="T1">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6" draw:layer="layout" draw:line-skew="0.163cm" svg:x1="23.86cm" svg:y1="11.16cm" svg:x2="12.99cm" svg:y2="14.643cm" draw:start-shape="id14" draw:start-glue-point="6" draw:end-shape="id10" svg:d="M23860 11160v1905h-10870v1578" svg:viewBox="0 0 10871 3484">
          <text:p/>
        </draw:connector>
      </draw:page>
      <draw:page draw:name="page2" draw:style-name="dp1" draw:master-page-name="Default">
        <draw:custom-shape draw:style-name="gr32" draw:text-style-name="P1" xml:id="id20" draw:id="id20" draw:layer="layout" svg:width="5.46cm" svg:height="3.048cm" svg:x="1.382cm" svg:y="14.97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3" draw:text-style-name="P2" xml:id="id21" draw:id="id21" draw:layer="layout" svg:width="5.498cm" svg:height="2.894cm" svg:x="8.583cm" svg:y="14.997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4.571cm" svg:height="2.159cm" svg:x="9.092cm" svg:y="15.486cm">
          <text:p text:style-name="P3"><text:span text:style-name="T1">Data Warehouse</text:span></text:p>
          <text:p text:style-name="P3"><text:span text:style-name="T1">Postgre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4.445cm" svg:height="2.159cm" svg:x="2.01cm" svg:y="15.44cm">
          <text:p text:style-name="P3"><text:span text:style-name="T1">Elastic Search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4" draw:text-style-name="P2" xml:id="id16" draw:id="id16" draw:layer="layout" svg:width="4.953cm" svg:height="2.755cm" svg:x="3.813cm" svg:y="8.6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2.077cm" svg:height="2.58cm" svg:x="1.59cm" svg:y="1.605cm">
          <text:p text:style-name="P2"><text:span text:style-name="T1">iOS</text:span></text:p>
          <text:p text:style-name="P2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4" draw:layer="layout" svg:width="2.087cm" svg:height="2.559cm" svg:x="4.953cm" svg:y="1.632cm">
          <text:p text:style-name="P3"><text:span text:style-name="T1">Android</text:span></text:p>
          <text:p text:style-name="P3"><text:span text:style-name="T1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9" draw:text-style-name="P3" xml:id="id15" draw:id="id15" draw:layer="layout" svg:width="2.088cm" svg:height="2.532cm" svg:x="8.286cm" svg:y="1.732cm">
          <text:p text:style-name="P3"><text:span text:style-name="T1">Web</text:span></text:p>
          <text:p text:style-name="P3"><text:span text:style-name="T1">Portal</text:span></text:p>
          <text:p text:style-name="P3"><text:span text:style-name="T1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5" draw:text-style-name="P9" xml:id="id19" draw:id="id19" draw:layer="layout" svg:width="3.096cm" svg:height="1.179cm" svg:x="4.711cm" svg:y="10.652cm">
          <text:p text:style-name="P5"><text:span text:style-name="T2">AWS EC2</text:span></text:p>
          <draw:enhanced-geometry svg:viewBox="0 0 21600 21600" draw:mirror-vertical="false" draw:mirror-horizont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5" xml:id="id17" draw:id="id17" draw:layer="layout" svg:width="2.15cm" svg:height="1.173cm" svg:x="1.772cm" svg:y="3.383cm">
          <text:p text:style-name="P5"><text:span text:style-name="T2">Encrypt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5" xml:id="id18" draw:id="id18" draw:layer="layout" svg:width="2.194cm" svg:height="1.149cm" svg:x="5.211cm" svg:y="3.466cm">
          <text:p text:style-name="P5"><text:span text:style-name="T2">Encrypt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3" draw:layer="layout" svg:width="3.091cm" svg:height="1.143cm" svg:x="4.694cm" svg:y="9.055cm">
          <text:p text:style-name="P3"><text:span text:style-name="T1">API 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6" draw:layer="layout" draw:line-skew="0.126cm" svg:x1="9.33cm" svg:y1="4.264cm" svg:x2="6.29cm" svg:y2="8.659cm" draw:start-shape="id15" draw:start-glue-point="6" draw:end-shape="id16" draw:end-glue-point="4" svg:d="M9330 4264v2324h-3040v2071" svg:viewBox="0 0 3041 4396">
          <text:p/>
        </draw:connector>
        <draw:connector draw:style-name="gr23" draw:text-style-name="P6" draw:layer="layout" svg:x1="2.847cm" svg:y1="4.556cm" svg:x2="6.29cm" svg:y2="8.659cm" draw:start-shape="id17" draw:start-glue-point="6" draw:end-shape="id16" draw:end-glue-point="4" svg:d="M2847 4556v2051h3443v2052" svg:viewBox="0 0 3444 4104">
          <text:p/>
        </draw:connector>
        <draw:connector draw:style-name="gr23" draw:text-style-name="P6" draw:layer="layout" svg:x1="6.308cm" svg:y1="4.615cm" svg:x2="6.29cm" svg:y2="8.659cm" draw:start-shape="id18" draw:start-glue-point="6" draw:end-shape="id16" draw:end-glue-point="4" svg:d="M6308 4615v2022h-18v2022" svg:viewBox="0 0 19 4045">
          <text:p/>
        </draw:connector>
        <draw:connector draw:style-name="gr23" draw:text-style-name="P6" draw:layer="layout" svg:x1="6.259cm" svg:y1="11.831cm" svg:x2="4.112cm" svg:y2="14.97cm" draw:start-shape="id19" draw:start-glue-point="6" draw:end-shape="id20" svg:d="M6259 11831v1570h-2147v1569" svg:viewBox="0 0 2148 3140">
          <text:p/>
        </draw:connector>
        <draw:line draw:style-name="gr25" draw:text-style-name="P6" draw:layer="layout" svg:x1="1.128cm" svg:y1="13.408cm" svg:x2="26.401cm" svg:y2="13.446cm">
          <text:p/>
        </draw:line>
        <draw:custom-shape draw:style-name="gr37" draw:text-style-name="P3" xml:id="id22" draw:id="id22" draw:layer="layout" svg:width="3.556cm" svg:height="2.921cm" svg:x="9.914cm" svg:y="8.62cm">
          <text:p text:style-name="P3"><text:span text:style-name="T1">Scheduler</text:span></text:p>
          <text:p text:style-name="P3"><text:span text:style-name="T1">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6" draw:layer="layout" draw:line-skew="-0.095cm" svg:x1="6.259cm" svg:y1="11.831cm" svg:x2="11.332cm" svg:y2="14.997cm" draw:start-shape="id19" draw:start-glue-point="6" draw:end-shape="id21" draw:end-glue-point="4" svg:d="M6259 11831v1488h5073v1678" svg:viewBox="0 0 5074 3167">
          <text:p/>
        </draw:connector>
        <draw:line draw:style-name="gr25" draw:text-style-name="P6" draw:layer="layout" svg:x1="1.001cm" svg:y1="5.326cm" svg:x2="26.401cm" svg:y2="5.318cm">
          <text:p/>
        </draw:line>
        <draw:connector draw:style-name="gr23" draw:text-style-name="P6" draw:layer="layout" svg:x1="11.692cm" svg:y1="11.541cm" svg:x2="11.332cm" svg:y2="14.997cm" draw:start-shape="id22" draw:start-glue-point="6" draw:end-shape="id21" draw:end-glue-point="4" svg:d="M11692 11541v1728h-360v1728" svg:viewBox="0 0 361 3457">
          <text:p/>
        </draw:connector>
        <draw:custom-shape draw:style-name="gr27" draw:text-style-name="P4" xml:id="id23" draw:id="id23" draw:layer="layout" svg:width="4.245cm" svg:height="2.84cm" svg:x="14.203cm" svg:y="8.636cm">
          <text:p text:style-name="P3"><text:span text:style-name="T1">Customer’s Data</text:span></text:p>
          <text:p text:style-name="P3"><text:span text:style-name="T1">Ingestion </text:span></text:p>
          <text:p text:style-name="P3"><text:span text:style-name="T1">Engin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6" draw:layer="layout" svg:x1="16.326cm" svg:y1="11.476cm" svg:x2="14.081cm" svg:y2="16.444cm" draw:start-shape="id23" draw:start-glue-point="6" draw:end-shape="id21" draw:end-glue-point="7" svg:d="M16326 11476v4968h-2245" svg:viewBox="0 0 2246 4969">
          <text:p/>
        </draw:connector>
        <draw:custom-shape draw:style-name="gr30" draw:text-style-name="P8" draw:layer="layout" svg:width="4.445cm" svg:height="1.143cm" svg:x="11.561cm" svg:y="1.381cm">
          <text:p text:style-name="P2">Clients tier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445cm" svg:height="1.143cm" svg:x="11.142cm" svg:y="5.715cm">
          <text:p text:style-name="P2">Middle tier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445cm" svg:height="1.143cm" svg:x="11.668cm" svg:y="13.646cm">
          <text:p text:style-name="P2">Data tier</text:p>
          <draw:enhanced-geometry svg:viewBox="0 0 21600 21600" draw:type="rectangle" draw:enhanced-path="M 0 0 L 21600 0 21600 21600 0 21600 0 0 Z N"/>
        </draw:custom-shape>
        <draw:custom-shape draw:style-name="gr38" draw:text-style-name="P4" xml:id="id24" draw:id="id24" draw:layer="layout" svg:width="3.556cm" svg:height="2.54cm" svg:x="19.083cm" svg:y="8.82cm">
          <text:p text:style-name="P3"><text:span text:style-name="T1">AI Analysis</text:span></text:p>
          <text:p text:style-name="P3"><text:span text:style-name="T1">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6" draw:layer="layout" svg:x1="20.861cm" svg:y1="11.36cm" svg:x2="14.081cm" svg:y2="16.444cm" draw:start-shape="id24" draw:start-glue-point="6" draw:end-shape="id21" draw:end-glue-point="7" svg:d="M20861 11360v5084h-6780" svg:viewBox="0 0 6781 5085">
          <text:p/>
        </draw:connector>
        <draw:custom-shape draw:style-name="gr35" draw:text-style-name="P9" draw:layer="layout" svg:width="3.096cm" svg:height="1.179cm" svg:x="9.915cm" svg:y="17.309cm">
          <text:p text:style-name="P5"><text:span text:style-name="T2">AWS RDS</text:span></text:p>
          <draw:enhanced-geometry svg:viewBox="0 0 21600 21600" draw:mirror-vertical="false" draw:mirror-horizont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9" draw:layer="layout" svg:width="3.096cm" svg:height="1.179cm" svg:x="2.557cm" svg:y="17.264cm">
          <text:p text:style-name="P5"><text:span text:style-name="T2">AWS RDS</text:span></text:p>
          <draw:enhanced-geometry svg:viewBox="0 0 21600 21600" draw:mirror-vertical="false" draw:mirror-horizont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9" draw:layer="layout" svg:width="2.667cm" svg:height="1.179cm" svg:x="10.349cm" svg:y="8.112cm">
          <text:p text:style-name="P5"><text:span text:style-name="T2">AWS EC2</text:span></text:p>
          <draw:enhanced-geometry svg:viewBox="0 0 21600 21600" draw:mirror-vertical="false" draw:mirror-horizont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9" draw:layer="layout" svg:width="2.667cm" svg:height="1.179cm" svg:x="19.463cm" svg:y="8.185cm">
          <text:p text:style-name="P5"><text:span text:style-name="T2">AWS EC2</text:span></text:p>
          <draw:enhanced-geometry svg:viewBox="0 0 21600 21600" draw:mirror-vertical="false" draw:mirror-horizont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9" draw:layer="layout" svg:width="2.667cm" svg:height="1.179cm" svg:x="14.863cm" svg:y="7.985cm">
          <text:p text:style-name="P5"><text:span text:style-name="T2">AWS EC2</text:span></text:p>
          <draw:enhanced-geometry svg:viewBox="0 0 21600 21600" draw:mirror-vertical="false" draw:mirror-horizont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6:12:25.259559791</meta:creation-date>
    <meta:generator>LibreOffice/6.0.7.3$Linux_X86_64 LibreOffice_project/00m0$Build-3</meta:generator>
    <dc:date>2022-01-27T16:19:34.324523258</dc:date>
    <meta:editing-duration>PT43M20S</meta:editing-duration>
    <meta:editing-cycles>10</meta:editing-cycles>
    <meta:document-statistic meta:object-count="76"/>
  </office:meta>
</office:document-meta>
</file>