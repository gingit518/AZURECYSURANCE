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98cm" fo:min-width="4.962cm"/>
    </style:style>
    <style:style style:name="gr2" style:family="graphic" style:parent-style-name="standard">
      <style:graphic-properties draw:textarea-horizontal-align="justify" draw:textarea-vertical-align="middle" draw:auto-grow-height="false" fo:min-height="0.89cm" fo:min-width="4.07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433cm" fo:min-width="8.643cm"/>
    </style:style>
    <style:style style:name="gr4" style:family="graphic" style:parent-style-name="standard">
      <style:graphic-properties draw:textarea-horizontal-align="justify" draw:textarea-vertical-align="middle" draw:auto-grow-height="false" fo:min-height="1.092cm" fo:min-width="1.53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87cm" fo:min-width="4.581cm"/>
      <style:paragraph-properties style:writing-mode="lr-tb"/>
    </style:style>
    <style:style style:name="gr6" style:family="graphic" style:parent-style-name="standard">
      <style:graphic-properties draw:fill-color="#fcd4d1" draw:textarea-horizontal-align="justify" draw:textarea-vertical-align="middle" draw:auto-grow-height="false" fo:min-height="1.212cm" fo:min-width="2.794cm"/>
      <style:paragraph-properties style:writing-mode="lr-tb"/>
    </style:style>
    <style:style style:name="gr7" style:family="graphic" style:parent-style-name="standard">
      <style:graphic-properties draw:fill-color="#fcd4d1" draw:textarea-horizontal-align="justify" draw:textarea-vertical-align="middle" draw:auto-grow-height="false" fo:min-height="0.88cm" fo:min-width="2.088cm"/>
      <style:paragraph-properties style:writing-mode="lr-tb"/>
    </style:style>
    <style:style style:name="gr8" style:family="graphic" style:parent-style-name="standard">
      <style:graphic-properties draw:fill-color="#fcd4d1" draw:textarea-horizontal-align="justify" draw:textarea-vertical-align="middle" draw:auto-grow-height="false" fo:min-height="1.162cm" fo:min-width="2.79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1.97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09cm" fo:min-width="4.204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_32__20_Dots_20_1_20_Dash" draw:fill="none" draw:textarea-vertical-align="middle"/>
    </style:style>
    <style:style style:name="gr13" style:family="graphic" style:parent-style-name="standard">
      <style:graphic-properties draw:fill-color="#fcd4d1" draw:textarea-horizontal-align="justify" draw:textarea-vertical-align="middle" draw:auto-grow-height="false" fo:min-height="2.541cm" fo:min-width="5.85cm"/>
      <style:paragraph-properties style:writing-mode="lr-tb"/>
    </style:style>
    <style:style style:name="gr14" style:family="graphic" style:parent-style-name="standard">
      <style:graphic-properties draw:fill-color="#fcd4d1" draw:textarea-horizontal-align="justify" draw:textarea-vertical-align="middle" draw:auto-grow-height="false" fo:min-height="0.809cm" fo:min-width="2.324cm"/>
      <style:paragraph-properties style:writing-mode="lr-tb"/>
    </style:style>
    <style:style style:name="gr15" style:family="graphic" style:parent-style-name="standard">
      <style:graphic-properties draw:fill-color="#fcd4d1" draw:textarea-horizontal-align="justify" draw:textarea-vertical-align="middle" draw:auto-grow-height="false" fo:min-height="1.379cm" fo:min-width="4.581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6.485cm"/>
      <style:paragraph-properties style:writing-mode="lr-tb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893cm" fo:min-width="3.945cm"/>
      <style:paragraph-properties style:writing-mode="lr-tb"/>
    </style:style>
    <style:style style:name="gr18" style:family="graphic" style:parent-style-name="objectwithoutfill">
      <style:graphic-properties draw:marker-start="Circle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fill-color="#fcd4d1" draw:textarea-horizontal-align="justify" draw:textarea-vertical-align="middle" draw:auto-grow-height="false" fo:min-height="1.045cm" fo:min-width="2.794cm"/>
      <style:paragraph-properties style:writing-mode="lr-tb"/>
    </style:style>
    <style:style style:name="gr20" style:family="graphic" style:parent-style-name="standard">
      <style:graphic-properties draw:fill-color="#fcd4d1" draw:textarea-horizontal-align="justify" draw:textarea-vertical-align="middle" draw:auto-grow-height="false" fo:min-height="0.971cm" fo:min-width="2.168cm"/>
      <style:paragraph-properties style:writing-mode="lr-tb"/>
    </style:style>
    <style:style style:name="gr21" style:family="graphic" style:parent-style-name="standard">
      <style:graphic-properties draw:fill-color="#fcd4d1" draw:textarea-horizontal-align="justify" draw:textarea-vertical-align="middle" draw:auto-grow-height="false" fo:min-height="0.971cm" fo:min-width="3.0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cd4d1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461cm" svg:height="3.429cm" svg:x="12.557cm" svg:y="15.451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4.571cm" svg:height="2.159cm" svg:x="13.066cm" svg:y="16.34cm">
          <text:p text:style-name="P1"><text:span text:style-name="T1">Data Warehouse</text:span></text:p>
          <text:p text:style-name="P1"><text:span text:style-name="T1">Postgre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3" draw:id="id3" draw:layer="layout" svg:width="9.143cm" svg:height="3.683cm" svg:x="2.441cm" svg:y="8.6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2.031cm" svg:height="1.69cm" svg:x="3.16cm" svg:y="7.819cm">
          <text:p text:style-name="P1"><text:span text:style-name="T2">oAut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2" xml:id="id1" draw:id="id1" draw:layer="layout" svg:width="5.08cm" svg:height="2.667cm" svg:x="6.842cm" svg:y="1.635cm">
          <text:p text:style-name="P1"><text:span text:style-name="T1">RiskQ </text:span></text:p>
          <text:p text:style-name="P1"><text:span text:style-name="T1">Application</text:span></text:p>
          <text:p text:style-name="P1"><text:span text:style-name="T1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4" xml:id="id8" draw:id="id8" draw:layer="layout" svg:width="3.556cm" svg:height="1.578cm" svg:x="14.589cm" svg:y="9.663cm">
          <text:p text:style-name="P1"><text:span text:style-name="T2">Assign Workflow</text:span></text:p>
          <text:p text:style-name="P1"><text:span text:style-name="T2">To Organiz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xml:id="id12" draw:id="id12" draw:layer="layout" svg:width="2.794cm" svg:height="1.22cm" svg:x="8.239cm" svg:y="8.035cm">
          <text:p text:style-name="P1"><text:span text:style-name="T2">Camunda </text:span></text:p>
          <text:p text:style-name="P1"><text:span text:style-name="T2">UI Conne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xml:id="id9" draw:id="id9" draw:layer="layout" svg:width="3.556cm" svg:height="1.524cm" svg:x="9.001cm" svg:y="11.36cm">
          <text:p text:style-name="P1"><text:span text:style-name="T2">Camunda 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3" draw:layer="layout" svg:width="2.667cm" svg:height="0.916cm" svg:x="15.632cm" svg:y="15.097cm">
          <text:p text:style-name="P1"><text:span text:style-name="T2">Encrypte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5.08cm" svg:height="1.143cm" svg:x="4.229cm" svg:y="9.89cm">
          <text:p text:style-name="P1"><text:span text:style-name="T1">RiskQ Backe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5" draw:layer="layout" svg:x1="9.382cm" svg:y1="4.302cm" svg:x2="4.176cm" svg:y2="7.819cm" draw:start-shape="id1" draw:start-glue-point="6" draw:end-shape="id2" draw:end-glue-point="4" svg:d="M9382 4302v1759h-5206v1758" svg:viewBox="0 0 5207 3518">
          <text:p/>
        </draw:connector>
        <draw:line draw:style-name="gr12" draw:text-style-name="P5" draw:layer="layout" svg:x1="1.127cm" svg:y1="13.408cm" svg:x2="26.4cm" svg:y2="13.446cm">
          <text:p/>
        </draw:line>
        <draw:connector draw:style-name="gr11" draw:text-style-name="P5" draw:layer="layout" svg:x1="7.013cm" svg:y1="12.342cm" svg:x2="12.557cm" svg:y2="17.166cm" draw:start-shape="id3" draw:start-glue-point="6" draw:end-shape="id4" draw:end-glue-point="5" svg:d="M7013 12342v4824h5544" svg:viewBox="0 0 5545 4825">
          <text:p/>
        </draw:connector>
        <draw:line draw:style-name="gr12" draw:text-style-name="P5" draw:layer="layout" svg:x1="1cm" svg:y1="5.326cm" svg:x2="26.4cm" svg:y2="5.318cm">
          <text:p/>
        </draw:line>
        <draw:custom-shape draw:style-name="gr13" draw:text-style-name="P6" xml:id="id5" draw:id="id5" draw:layer="layout" svg:width="6.858cm" svg:height="3.013cm" svg:x="20.812cm" svg:y="9.101cm">
          <text:p text:style-name="P1"><text:span text:style-name="T1">Camunda Engin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5" draw:layer="layout" svg:x1="24.241cm" svg:y1="12.114cm" svg:x2="18.018cm" svg:y2="17.166cm" draw:start-shape="id5" draw:start-glue-point="6" draw:end-shape="id4" draw:end-glue-point="7" svg:d="M24241 12114v5052h-6223" svg:viewBox="0 0 6224 5053">
          <text:p/>
        </draw:connector>
        <draw:custom-shape draw:style-name="gr14" draw:text-style-name="P4" xml:id="id7" draw:id="id7" draw:layer="layout" svg:width="3.048cm" svg:height="1.143cm" svg:x="22.844cm" svg:y="8.366cm">
          <text:p text:style-name="P1"><text:span text:style-name="T2">AP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6" xml:id="id6" draw:id="id6" draw:layer="layout" svg:width="5.08cm" svg:height="2.032cm" svg:x="22.463cm" svg:y="1.508cm">
          <text:p text:style-name="P1"><text:span text:style-name="T1">Camunda </text:span></text:p>
          <text:p text:style-name="P1"><text:span text:style-name="T1">Data Modeler</text:span></text:p>
          <draw:enhanced-geometry svg:viewBox="0 0 21600 21600" draw:mirror-vertical="false" draw:mirror-horizont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5" draw:layer="layout" svg:x1="25.003cm" svg:y1="3.54cm" svg:x2="24.368cm" svg:y2="8.366cm" draw:start-shape="id6" draw:start-glue-point="6" draw:end-shape="id7" draw:end-glue-point="4" svg:d="M25003 3540v2413h-635v2413" svg:viewBox="0 0 636 4827">
          <text:p/>
        </draw:connector>
        <draw:custom-shape draw:style-name="gr16" draw:text-style-name="P7" draw:layer="layout" svg:width="6.985cm" svg:height="1.143cm" svg:x="14.081cm" svg:y="2.016cm">
          <text:p text:style-name="P1">Camunda Integration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445cm" svg:height="1.143cm" svg:x="19.288cm" svg:y="17.637cm">
          <text:p text:style-name="P1">Data tier</text:p>
          <draw:enhanced-geometry svg:viewBox="0 0 21600 21600" draw:type="rectangle" draw:enhanced-path="M 0 0 L 21600 0 21600 21600 0 21600 0 0 Z N"/>
        </draw:custom-shape>
        <draw:custom-shape draw:style-name="gr14" draw:text-style-name="P4" xml:id="id10" draw:id="id10" draw:layer="layout" svg:width="3.048cm" svg:height="1.143cm" svg:x="19.923cm" svg:y="11.541cm">
          <text:p text:style-name="P1"><text:span text:style-name="T2">RiskQ Task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5" draw:layer="layout" svg:x1="20.812cm" svg:y1="10.608cm" svg:x2="18.145cm" svg:y2="10.452cm" draw:start-shape="id5" draw:start-glue-point="5" draw:end-shape="id8" draw:end-glue-point="7" svg:d="M20812 10608h-1333v-156h-1334" svg:viewBox="0 0 2668 157">
          <text:p/>
        </draw:connector>
        <draw:connector draw:style-name="gr18" draw:text-style-name="P5" draw:layer="layout" svg:x1="14.716cm" svg:y1="10.461cm" svg:x2="11.584cm" svg:y2="10.5cm" draw:end-shape="id3" draw:end-glue-point="7" svg:d="M14716 10461h-1315v39h-1817" svg:viewBox="0 0 3133 40">
          <text:p/>
        </draw:connector>
        <draw:connector draw:style-name="gr18" draw:text-style-name="P5" draw:layer="layout" svg:x1="12.557cm" svg:y1="12.122cm" svg:x2="19.923cm" svg:y2="12.113cm" draw:start-shape="id9" draw:start-glue-point="7" draw:end-shape="id10" draw:end-glue-point="5" svg:d="M12557 12122h3684v-9h3682" svg:viewBox="0 0 7367 10">
          <text:p/>
        </draw:connector>
        <draw:custom-shape draw:style-name="gr19" draw:text-style-name="P4" xml:id="id11" draw:id="id11" draw:layer="layout" svg:width="3.556cm" svg:height="1.397cm" svg:x="10.144cm" svg:y="3.54cm">
          <text:p text:style-name="P1"><text:span text:style-name="T2">Camunda </text:span></text:p>
          <text:p text:style-name="P1"><text:span text:style-name="T2">Workflow U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5" draw:layer="layout" svg:x1="22.971cm" svg:y1="8.903cm" svg:x2="13.7cm" svg:y2="4.239cm" draw:end-shape="id11" draw:end-glue-point="7" svg:d="M22971 8903h-4384v-4664h-4887" svg:viewBox="0 0 9272 4665">
          <text:p/>
        </draw:connector>
        <draw:connector draw:style-name="gr18" draw:text-style-name="P5" draw:layer="layout" svg:x1="9.636cm" svg:y1="8.035cm" svg:x2="11.922cm" svg:y2="4.937cm" draw:start-shape="id12" draw:start-glue-point="4" draw:end-shape="id11" draw:end-glue-point="6" svg:d="M9636 8035v-1549h2286v-1549" svg:viewBox="0 0 2287 3099">
          <text:p/>
        </draw:connector>
      </draw:page>
      <draw:page draw:name="page2" draw:style-name="dp1" draw:master-page-name="Default">
        <draw:custom-shape draw:style-name="gr1" draw:text-style-name="P1" xml:id="id16" draw:id="id16" draw:layer="layout" svg:width="5.461cm" svg:height="3.429cm" svg:x="12.557cm" svg:y="15.451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4.571cm" svg:height="2.159cm" svg:x="13.066cm" svg:y="16.34cm">
          <text:p text:style-name="P1"><text:span text:style-name="T1">Data Warehouse</text:span></text:p>
          <text:p text:style-name="P1"><text:span text:style-name="T1">Postgre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15" draw:id="id15" draw:layer="layout" svg:width="9.143cm" svg:height="3.683cm" svg:x="2.441cm" svg:y="8.6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4" draw:id="id14" draw:layer="layout" svg:width="2.031cm" svg:height="1.69cm" svg:x="3.16cm" svg:y="7.819cm">
          <text:p text:style-name="P1"><text:span text:style-name="T2">oAut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2" xml:id="id13" draw:id="id13" draw:layer="layout" svg:width="5.08cm" svg:height="2.667cm" svg:x="6.842cm" svg:y="1.635cm">
          <text:p text:style-name="P1"><text:span text:style-name="T1">RiskQ </text:span></text:p>
          <text:p text:style-name="P1"><text:span text:style-name="T1">Application</text:span></text:p>
          <text:p text:style-name="P1"><text:span text:style-name="T1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4" xml:id="id20" draw:id="id20" draw:layer="layout" svg:width="3.556cm" svg:height="1.578cm" svg:x="14.716cm" svg:y="9.709cm">
          <text:p text:style-name="P1"><text:span text:style-name="T2">Assign Workflow</text:span></text:p>
          <text:p text:style-name="P1"><text:span text:style-name="T2">To Organization</text:span></text:p>
          <draw:enhanced-geometry svg:viewBox="0 0 21600 21600" draw:glue-points="10800 0 0 10800 10800 21600 21600 10800" draw:text-areas="?f4 ?f6 ?f5 ?f7" draw:mirror-vertical="false" draw:mirror-horizont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xml:id="id21" draw:id="id21" draw:layer="layout" svg:width="3.556cm" svg:height="1.524cm" svg:x="9.382cm" svg:y="11.36cm">
          <text:p text:style-name="P1"><text:span text:style-name="T2">Risk-Q flows </text:span></text:p>
          <text:p text:style-name="P1"><text:span text:style-name="T2">Librar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3" draw:layer="layout" svg:width="2.667cm" svg:height="0.916cm" svg:x="15.632cm" svg:y="15.097cm">
          <text:p text:style-name="P1"><text:span text:style-name="T2">Encrypte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5.08cm" svg:height="1.143cm" svg:x="4.229cm" svg:y="9.89cm">
          <text:p text:style-name="P1"><text:span text:style-name="T1">Risk-Q Backe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5" draw:layer="layout" svg:x1="9.382cm" svg:y1="4.302cm" svg:x2="4.176cm" svg:y2="7.819cm" draw:start-shape="id13" draw:start-glue-point="6" draw:end-shape="id14" draw:end-glue-point="4" svg:d="M9382 4302v1759h-5206v1758" svg:viewBox="0 0 5207 3518">
          <text:p/>
        </draw:connector>
        <draw:line draw:style-name="gr12" draw:text-style-name="P5" draw:layer="layout" svg:x1="1.127cm" svg:y1="13.408cm" svg:x2="26.4cm" svg:y2="13.446cm">
          <text:p/>
        </draw:line>
        <draw:connector draw:style-name="gr11" draw:text-style-name="P5" draw:layer="layout" svg:x1="7.013cm" svg:y1="12.342cm" svg:x2="12.557cm" svg:y2="17.166cm" draw:start-shape="id15" draw:start-glue-point="6" draw:end-shape="id16" draw:end-glue-point="5" svg:d="M7013 12342v4824h5544" svg:viewBox="0 0 5545 4825">
          <text:p/>
        </draw:connector>
        <draw:line draw:style-name="gr12" draw:text-style-name="P5" draw:layer="layout" svg:x1="1cm" svg:y1="5.326cm" svg:x2="26.4cm" svg:y2="5.318cm">
          <text:p/>
        </draw:line>
        <draw:custom-shape draw:style-name="gr13" draw:text-style-name="P6" xml:id="id17" draw:id="id17" draw:layer="layout" svg:width="6.858cm" svg:height="3.013cm" svg:x="20.812cm" svg:y="9.101cm">
          <text:p text:style-name="P1"><text:span text:style-name="T1">Risk-Q Workflow Engin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5" draw:layer="layout" svg:x1="24.241cm" svg:y1="12.114cm" svg:x2="18.018cm" svg:y2="17.166cm" draw:start-shape="id17" draw:start-glue-point="6" draw:end-shape="id16" draw:end-glue-point="7" svg:d="M24241 12114v5052h-6223" svg:viewBox="0 0 6224 5053">
          <text:p/>
        </draw:connector>
        <draw:custom-shape draw:style-name="gr14" draw:text-style-name="P4" xml:id="id19" draw:id="id19" draw:layer="layout" svg:width="3.048cm" svg:height="1.143cm" svg:x="22.844cm" svg:y="8.366cm">
          <text:p text:style-name="P1"><text:span text:style-name="T2">AP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6" xml:id="id18" draw:id="id18" draw:layer="layout" svg:width="2.667cm" svg:height="1.524cm" svg:x="25.257cm" svg:y="1.762cm">
          <text:p text:style-name="P1"><text:span text:style-name="T1">BPML</text:span></text:p>
          <draw:enhanced-geometry svg:viewBox="0 0 21600 21600" draw:mirror-vertical="false" draw:mirror-horizont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5" draw:layer="layout" svg:x1="26.591cm" svg:y1="3.286cm" svg:x2="24.368cm" svg:y2="8.366cm" draw:start-shape="id18" draw:start-glue-point="6" draw:end-shape="id19" draw:end-glue-point="4" svg:d="M26591 3286v2540h-2223v2540" svg:viewBox="0 0 2224 5081">
          <text:p/>
        </draw:connector>
        <draw:custom-shape draw:style-name="gr16" draw:text-style-name="P7" draw:layer="layout" svg:width="6.985cm" svg:height="1.143cm" svg:x="13.481cm" svg:y="1.416cm">
          <text:p text:style-name="P1">Workflow Integration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445cm" svg:height="1.143cm" svg:x="19.288cm" svg:y="17.637cm">
          <text:p text:style-name="P1">Data tier</text:p>
          <draw:enhanced-geometry svg:viewBox="0 0 21600 21600" draw:type="rectangle" draw:enhanced-path="M 0 0 L 21600 0 21600 21600 0 21600 0 0 Z N"/>
        </draw:custom-shape>
        <draw:custom-shape draw:style-name="gr14" draw:text-style-name="P4" xml:id="id22" draw:id="id22" draw:layer="layout" svg:width="3.048cm" svg:height="1.143cm" svg:x="19.923cm" svg:y="11.541cm">
          <text:p text:style-name="P1"><text:span text:style-name="T2">Risk-Q Task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5" draw:layer="layout" svg:x1="20.812cm" svg:y1="10.608cm" svg:x2="18.272cm" svg:y2="10.498cm" draw:start-shape="id17" draw:start-glue-point="5" draw:end-shape="id20" draw:end-glue-point="7" svg:d="M20812 10608h-1269v-110h-1271" svg:viewBox="0 0 2541 111">
          <text:p/>
        </draw:connector>
        <draw:connector draw:style-name="gr18" draw:text-style-name="P5" draw:layer="layout" svg:x1="14.716cm" svg:y1="10.498cm" svg:x2="11.584cm" svg:y2="10.5cm" draw:start-shape="id20" draw:end-shape="id15" draw:end-glue-point="7" svg:d="M14716 10498h-1566v2h-1566" svg:viewBox="0 0 3133 3">
          <text:p/>
        </draw:connector>
        <draw:connector draw:style-name="gr18" draw:text-style-name="P5" draw:layer="layout" svg:x1="12.938cm" svg:y1="12.122cm" svg:x2="19.923cm" svg:y2="12.113cm" draw:start-shape="id21" draw:start-glue-point="7" draw:end-shape="id22" draw:end-glue-point="5" svg:d="M12938 12122h3493v-9h3492" svg:viewBox="0 0 6986 10">
          <text:p/>
        </draw:connector>
        <draw:custom-shape draw:style-name="gr19" draw:text-style-name="P4" xml:id="id23" draw:id="id23" draw:layer="layout" svg:width="3.556cm" svg:height="1.397cm" svg:x="10.144cm" svg:y="3.54cm">
          <text:p text:style-name="P1"><text:span text:style-name="T2">Risk-Q </text:span></text:p>
          <text:p text:style-name="P1"><text:span text:style-name="T2">Workflow U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5" draw:layer="layout" svg:x1="22.971cm" svg:y1="8.903cm" svg:x2="13.7cm" svg:y2="4.239cm" draw:end-shape="id23" draw:end-glue-point="7" svg:d="M22971 8903h-4384v-4664h-4887" svg:viewBox="0 0 9272 4665">
          <text:p/>
        </draw:connector>
        <draw:connector draw:style-name="gr18" draw:text-style-name="P5" draw:layer="layout" svg:x1="12.938cm" svg:y1="12.122cm" svg:x2="11.922cm" svg:y2="4.937cm" draw:start-shape="id21" draw:start-glue-point="7" draw:end-shape="id23" draw:end-glue-point="6" svg:d="M12938 12122h502v-3973h-1518v-3212" svg:viewBox="0 0 1519 7186">
          <text:p/>
        </draw:connector>
        <draw:custom-shape draw:style-name="gr21" draw:text-style-name="P6" xml:id="id24" draw:id="id24" draw:layer="layout" svg:width="3.556cm" svg:height="1.524cm" svg:x="21.32cm" svg:y="1.762cm">
          <text:p text:style-name="P1"><text:span text:style-name="T1">Java Workflow </text:span></text:p>
          <text:p text:style-name="P1"><text:span text:style-name="T1">Library</text:span></text:p>
          <draw:enhanced-geometry svg:viewBox="0 0 21600 21600" draw:mirror-vertical="false" draw:mirror-horizont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5" draw:layer="layout" svg:x1="23.098cm" svg:y1="3.286cm" svg:x2="24.368cm" svg:y2="8.366cm" draw:start-shape="id24" draw:start-glue-point="6" draw:end-shape="id19" draw:end-glue-point="4" svg:d="M23098 3286v2540h1270v2540" svg:viewBox="0 0 1271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6:12:25.259559791</meta:creation-date>
    <meta:generator>LibreOffice/6.4.7.2$Linux_X86_64 LibreOffice_project/40$Build-2</meta:generator>
    <dc:date>2022-07-06T13:53:36.638820683</dc:date>
    <meta:editing-duration>P9DT16H43M8S</meta:editing-duration>
    <meta:editing-cycles>15</meta:editing-cycles>
    <meta:document-statistic meta:object-count="57"/>
  </office:meta>
</office:document-meta>
</file>